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ru" fo:country="RU" officeooo:rsid="000d004c" officeooo:paragraph-rsid="000d004c"/>
    </style:style>
    <style:style style:name="P2" style:family="paragraph" style:parent-style-name="Нумерованная_20_первая_20_строка_20_с_20_отступом">
      <style:text-properties fo:language="ru" fo:country="RU" officeooo:rsid="000d004c" officeooo:paragraph-rsid="000d004c"/>
    </style:style>
    <style:style style:name="P3" style:family="paragraph" style:parent-style-name="Нумерованная_20_первая_20_строка_20_с_20_отступом">
      <style:text-properties fo:language="ru" fo:country="RU" officeooo:rsid="000f0437" officeooo:paragraph-rsid="000f0437"/>
    </style:style>
    <style:style style:name="P4" style:family="paragraph" style:parent-style-name="Standard">
      <style:text-properties officeooo:paragraph-rsid="000f0437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еречень вопросов к экзамену по дисциплине<text:line-break/>«Языки программирования»</text:h>
      <text:list text:style-name="Numbering_20_123">
        <text:list-item>
          <text:p text:style-name="P2">Напишите функцию, которая реверсирует строку без использования срезов или встроенных функций.</text:p>
        </text:list-item>
        <text:list-item>
          <text:p text:style-name="P2">Напишите функцию, которая проверяет, является ли строка палиндромом (читается одинаково слева направо и справа налево).</text:p>
        </text:list-item>
        <text:list-item>
          <text:p text:style-name="P2">Напишите функцию, которая подсчитывает количество вхождений элемента в списке.</text:p>
        </text:list-item>
        <text:list-item>
          <text:p text:style-name="P2">Напишите функцию, которая возвращает список уникальных элементов из исходного списка.</text:p>
        </text:list-item>
        <text:list-item>
          <text:p text:style-name="P2">Напишите функцию, которая сортирует список чисел по возрастанию без использования встроенных функций сортировки.</text:p>
        </text:list-item>
        <text:list-item>
          <text:p text:style-name="P2">Напишите рекурсивную функцию для вычисления факториала числа.</text:p>
        </text:list-item>
        <text:list-item>
          <text:p text:style-name="P2">Напишите генератор, который возвращает числа Фибоначчи.</text:p>
        </text:list-item>
        <text:list-item>
          <text:p text:style-name="P2">Напишите функцию, которая находит второе по величине число<text:line-break/>в списке.</text:p>
        </text:list-item>
        <text:list-item>
          <text:p text:style-name="P2">Напишите функцию, которая проверяет, правильно ли расставлены скобки в строке.</text:p>
        </text:list-item>
        <text:list-item>
          <text:p text:style-name="P2">Напишите функцию, которая подсчитывает частоту каждого символа<text:line-break/>в строке.</text:p>
        </text:list-item>
        <text:list-item>
          <text:p text:style-name="P2">Проверить, являются ли две строки анаграммами (содержат одинаковые буквы в разном порядке).</text:p>
        </text:list-item>
        <text:list-item>
          <text:p text:style-name="P2">Найти все пары чисел в списке, которые в сумме дают заданное число.</text:p>
        </text:list-item>
        <text:list-item>
          <text:p text:style-name="P2">Вернуть самое длинное слово из строки.</text:p>
        </text:list-item>
        <text:list-item>
          <text:p text:style-name="P3">Напишите функцию, рекурсивно выводящую числа от <text:span text:style-name="T1">N </text:span>до 0.</text:p>
        </text:list-item>
        <text:list-item>
          <text:p text:style-name="P3">Из списка слов сгруппировать слова, являющиеся анаграммами.</text:p>
        </text:list-item>
        <text:list-item>
          <text:p text:style-name="P3">Напишите функцию, реализующую перестановку строки рекурсивно.</text:p>
        </text:list-item>
        <text:list-item>
          <text:p text:style-name="P3">Напишите функцию, возводящее целое число в степень без использования встроенных функций и операторов.</text:p>
        </text:list-item>
        <text:list-item>
          <text:p text:style-name="P3">Напишите функцию, выполняющую проверку на простое число.</text:p>
        </text:list-item>
        <text:list-item>
          <text:p text:style-name="P3"><text:soft-page-break/>Напишите функцию, выполняющую поиск самого длинного подстрочного палиндрома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text-indent="1.251cm" style:auto-text-indent="false"/>
    </style:style>
    <style:style style:name="Нумерованная_20_первая_20_строка_20_с_20_отступом" style:display-name="Нумерованная первая строка с отступом" style:family="paragraph" style:parent-style-name="First_20_line_20_indent" style:list-style-name="Numbering_20_123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3T06:57:45.557472200</meta:creation-date>
    <dc:date>2026-06-23T20:28:49.887502100</dc:date>
    <meta:editing-duration>PT10M24S</meta:editing-duration>
    <meta:editing-cycles>2</meta:editing-cycles>
    <meta:generator>LibreOffice/26.2.1.2$Windows_X86_64 LibreOffice_project/620$Build-2</meta:generator>
    <meta:document-statistic meta:table-count="0" meta:image-count="0" meta:object-count="0" meta:page-count="2" meta:paragraph-count="20" meta:word-count="207" meta:character-count="1540" meta:non-whitespace-character-count="1372"/>
  </office:meta>
</office:document-meta>
</file>