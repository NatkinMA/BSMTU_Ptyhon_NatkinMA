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 officeooo:rsid="000d004c" officeooo:paragraph-rsid="000d004c"/>
    </style:style>
    <style:style style:name="P2" style:family="paragraph" style:parent-style-name="Нумерованная_20_первая_20_строка_20_с_20_отступом">
      <style:text-properties officeooo:rsid="000d004c" officeooo:paragraph-rsid="000d004c"/>
    </style:style>
    <style:style style:name="P3" style:family="paragraph" style:parent-style-name="Нумерованная_20_первая_20_строка_20_с_20_отступом">
      <style:text-properties fo:language="ru" fo:country="RU" officeooo:rsid="000d004c" officeooo:paragraph-rsid="000d004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еречень вопросов к экзамену по дисциплине<text:line-break/>«Языки программирования»</text:h>
      <text:list text:style-name="Numbering_20_123">
        <text:list-item>
          <text:p text:style-name="P2">История развития языков программирования.</text:p>
        </text:list-item>
        <text:list-item>
          <text:p text:style-name="P2">Понятие языка программирования. Синтаксис и семантика языка. Способы реализации языков: компиляция, интерпретация, смешанный подход.</text:p>
        </text:list-item>
        <text:list-item>
          <text:p text:style-name="P2">Язык программирования <text:span text:style-name="T1">Python </text:span><text:span text:style-name="T2">и его место среди других языков программирования. Установка </text:span><text:span text:style-name="T1">Python.</text:span></text:p>
        </text:list-item>
        <text:list-item>
          <text:p text:style-name="P3">Работа в интерактивном режиме интерпретатора. Среда программирования. Использование документации.</text:p>
        </text:list-item>
        <text:list-item>
          <text:p text:style-name="P3">Работа с числами. Базовые числовые типы <text:span text:style-name="T1">int </text:span>и <text:span text:style-name="T1">float. </text:span>Числовые литералы. Операторы для работы с числовыми объектами. Форматы чисел. Встроенные функции и модули для работы с числами. Преобразование и смешивание в выражениях различных типов.</text:p>
        </text:list-item>
        <text:list-item>
          <text:p text:style-name="P3">Строки. Литералы строк. Типы <text:span text:style-name="T1">str, bytes, bytearray. </text:span>Операции над строками: конкатенация, повторение, доступ по индексу, получение подстроки, проверка вхождения.</text:p>
        </text:list-item>
        <text:list-item>
          <text:p text:style-name="P3">Форматирование строк. Функции и методы для работы со строками. Регулярные выражения.</text:p>
        </text:list-item>
        <text:list-item>
          <text:p text:style-name="P3">Списки. Создание списков. Операции над списками. Перебор элементов списка. Многомерные списки. Методы списков. Кортежи.</text:p>
        </text:list-item>
        <text:list-item>
          <text:p text:style-name="P3">Словари. Создание словаря. Операции над словарями. Перебор элементов словаря. Методы работы со словарями. Множества.</text:p>
        </text:list-item>
        <text:list-item>
          <text:p text:style-name="P3">Переменные. Правила именования переменных. Присваивание значения переменным. Динамическая типизация.</text:p>
        </text:list-item>
        <text:list-item>
          <text:p text:style-name="P3">Понятие о счетчике ссылок и сборке мусора. Проверка и преобразование типов данных. Удаление переменной.</text:p>
        </text:list-item>
        <text:list-item>
          <text:p text:style-name="P3">Структура программы. Комментарии. Блок. Правила оформления отступов.</text:p>
        </text:list-item>
        <text:list-item>
          <text:p text:style-name="P3">Инструкция присваивания. Групповое присваивание. Комбинированные инструкции присваивания. Инструкции выражений. Функция <text:span text:style-name="T1">print.</text:span></text:p>
        </text:list-item>
        <text:list-item>
          <text:p text:style-name="P3">Операторы сравнения. Логические операторы. Инструкция ветвления <text:span text:style-name="T1">if … else. </text:span>Инструкция цикла <text:span text:style-name="T1">while. </text:span>Инструкция цикла <text:span text:style-name="T1">for.</text:span></text:p>
        </text:list-item>
        <text:list-item>
          <text:p text:style-name="P3"><text:soft-page-break/>Инструкции <text:span text:style-name="T1">break, continue, pass, else.</text:span></text:p>
        </text:list-item>
        <text:list-item>
          <text:p text:style-name="P3">Функции. Создание функций. Область видимости переменной. Передача аргументов в функцию. Инструкция <text:span text:style-name="T1">return. </text:span>Вызов функции.</text:p>
        </text:list-item>
        <text:list-item>
          <text:p text:style-name="P3">Лямбда-функции. Функции генераторы. Инструкция <text:span text:style-name="T1">yield.</text:span></text:p>
        </text:list-item>
        <text:list-item>
          <text:p text:style-name="P3">Модули. Инструкция <text:span text:style-name="T1">import </text:span>и <text:span text:style-name="T1">from. </text:span>Обзор стандартной библиотеки <text:span text:style-name="T1">Python.</text:span></text:p>
        </text:list-item>
        <text:list-item>
          <text:p text:style-name="P3">Базовые принципы объектно-ориентированного программирования: инкапсуляция, наследование, полиморфизм.</text:p>
        </text:list-item>
        <text:list-item>
          <text:p text:style-name="P3">Классы в языке <text:span text:style-name="T1">Python. </text:span>Инструкция <text:span text:style-name="T1">class. </text:span>Создание экземпляра класса. Атрибуты класса и экземпляра класса. Методы класса.</text:p>
        </text:list-item>
        <text:list-item>
          <text:p text:style-name="P3">Конструктор и деструктор класса. Статические методы. Закрытые методы и атрибуты. Свойства. Наследование. Множественное наследование. Перегрузка операторов.</text:p>
        </text:list-item>
        <text:list-item>
          <text:p text:style-name="P3">Событийно-ориентированное программирование. Событие. Обработчик события. Цикл обработки событий.</text:p>
        </text:list-item>
        <text:list-item>
          <text:p text:style-name="P3">Инструменты для создания графических интерфейсов пользователя <text:span text:style-name="T1">(GUI</text:span>).</text:p>
        </text:list-item>
        <text:list-item>
          <text:p text:style-name="P3">Создание базового окна. Элементы графического интерфейса (виджеты).</text:p>
        </text:list-item>
        <text:list-item>
          <text:p text:style-name="P3">Создание и конфигурация виджета. Менеджер размещения.</text:p>
        </text:list-item>
        <text:list-item>
          <text:p text:style-name="P3">Использование элементов «Кнопка», «Надпись», «Текстовое поле», «Флажок», «Переключатель».</text:p>
        </text:list-item>
        <text:list-item>
          <text:p text:style-name="P3">Связывание виджетов по событиям с функциями.</text:p>
        </text:list-item>
        <text:list-item>
          <text:p text:style-name="P3">Создание графических объектов. Поле <text:span text:style-name="T1">Canvas. </text:span>Редактирование объектов. Перемещение, изменение размера, удаление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text-indent="1.251cm" style:auto-text-indent="false"/>
    </style:style>
    <style:style style:name="Нумерованная_20_первая_20_строка_20_с_20_отступом" style:display-name="Нумерованная первая строка с отступом" style:family="paragraph" style:parent-style-name="First_20_line_20_indent" style:list-style-name="Numbering_20_123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3T06:57:45.557472200</meta:creation-date>
    <dc:date>2026-05-23T07:21:52.677345900</dc:date>
    <meta:editing-duration>PT1M9S</meta:editing-duration>
    <meta:editing-cycles>1</meta:editing-cycles>
    <meta:document-statistic meta:table-count="0" meta:image-count="0" meta:object-count="0" meta:page-count="2" meta:paragraph-count="29" meta:word-count="348" meta:character-count="2928" meta:non-whitespace-character-count="2637"/>
    <meta:generator>LibreOffice/26.2.1.2$Windows_X86_64 LibreOffice_project/620$Build-2</meta:generator>
  </office:meta>
</office:document-meta>
</file>