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1">
      <style:text-properties fo:language="ru" fo:country="RU" officeooo:rsid="000d004c" officeooo:paragraph-rsid="000d004c"/>
    </style:style>
    <style:style style:name="P2" style:family="paragraph" style:parent-style-name="Нумерованная_20_первая_20_строка_20_с_20_отступом">
      <style:text-properties officeooo:rsid="000d004c" officeooo:paragraph-rsid="000d004c"/>
    </style:style>
    <style:style style:name="P3" style:family="paragraph" style:parent-style-name="Нумерованная_20_первая_20_строка_20_с_20_отступом">
      <style:text-properties officeooo:rsid="000f4d0b" officeooo:paragraph-rsid="000f4d0b"/>
    </style:style>
    <style:style style:name="P4" style:family="paragraph" style:parent-style-name="Нумерованная_20_первая_20_строка_20_с_20_отступом">
      <style:text-properties officeooo:rsid="0010ca81" officeooo:paragraph-rsid="0010ca81"/>
    </style:style>
    <style:style style:name="T1" style:family="text">
      <style:text-properties officeooo:rsid="000f4d0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Перечень <text:span text:style-name="T1">тем</text:span> <text:span text:style-name="T1">лабораторных работ </text:span>по дисциплине<text:line-break/>«Языки программирования»</text:h>
      <text:list text:style-name="Numbering_20_123">
        <text:list-item>
          <text:p text:style-name="P2">История развития языков программирования.</text:p>
        </text:list-item>
        <text:list-item>
          <text:p text:style-name="P2">Понятие языка программирования. Синтаксис и семантика языка. Способы реализации языков: компиляция, интерпретация, смешанный подход.</text:p>
        </text:list-item>
        <text:list-item>
          <text:p text:style-name="P2">Язык программирования Python и его место среди других языков программирования.</text:p>
        </text:list-item>
        <text:list-item>
          <text:p text:style-name="P2">Установка и настройка средств программирования: VirtualBox, AstraLinux, Python, <text:span text:style-name="T1">Pip, Git, OpenIDE, GitHub.</text:span></text:p>
        </text:list-item>
        <text:list-item>
          <text:p text:style-name="P2">Изучение операций языка Python. Программирование линейных и разветвляющихся алгоритмов. Операторы цикла.</text:p>
        </text:list-item>
        <text:list-item>
          <text:p text:style-name="P2">Одномерные массивы.</text:p>
        </text:list-item>
        <text:list-item>
          <text:p text:style-name="P2">Двумерные массивы и функции.</text:p>
        </text:list-item>
        <text:list-item>
          <text:p text:style-name="P3">Чтение и запись данных из/в файлы.</text:p>
        </text:list-item>
        <text:list-item>
          <text:p text:style-name="P3">Программирование графики. Модуль turtle.</text:p>
        </text:list-item>
        <text:list-item>
          <text:p text:style-name="P3">Графический интерфейс пользователя. Событийно-управляемое программирование. Модуль tkinter.</text:p>
        </text:list-item>
        <text:list-item>
          <text:p text:style-name="P4">Язык программирования: лексический и синтаксический анализатор, Расширенная форма Бекуса-Наура.</text:p>
        </text:list-item>
        <text:list-item>
          <text:p text:style-name="P4">Язык программирования: семантический анализ, абстрактное синтаксическое дерево.</text:p>
        </text:list-item>
        <text:list-item>
          <text:p text:style-name="P4">Язык программирования: генерация кода.</text:p>
        </text:list-item>
        <text:list-item>
          <text:p text:style-name="P4">Язык программирования: поддержка составных типов.</text:p>
        </text:list-item>
        <text:list-item>
          <text:p text:style-name="P4">Язык программирования: классы и перегрузка функций.</text:p>
        </text:list-item>
        <text:list-item>
          <text:p text:style-name="P4">Типы данных. Списки, словари, кортежи, множества.</text:p>
        </text:list-item>
        <text:list-item>
          <text:p text:style-name="P2">Модули и пакеты в языке программирования Python.</text:p>
        </text:list-item>
        <text:list-item>
          <text:p text:style-name="P4">Виртуальное окружение Python.</text:p>
        </text:list-item>
        <text:list-item>
          <text:p text:style-name="P4">Классы в Python.</text:p>
        </text:list-item>
        <text:list-item>
          <text:p text:style-name="P4">Структуры данных: список в Python.</text:p>
        </text:list-item>
        <text:list-item>
          <text:p text:style-name="P4">Регулярные выражения в Python.</text:p>
        </text:list-item>
        <text:list-item>
          <text:p text:style-name="P4"><text:soft-page-break/>Базовое администрирование Linux с использованием Python: управление учетными записями пользователей, копирование <text:s/>и удаление файлов, вывод данных о системе, запуск выполнения задач по расписанию, резервное копирование данных.</text:p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4p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First_20_line_20_indent" style:display-name="First line indent" style:family="paragraph" style:parent-style-name="Text_20_body" style:class="text">
      <style:paragraph-properties fo:margin-left="0cm" fo:text-indent="1.251cm" style:auto-text-indent="false"/>
    </style:style>
    <style:style style:name="Нумерованная_20_первая_20_строка_20_с_20_отступом" style:display-name="Нумерованная первая строка с отступом" style:family="paragraph" style:parent-style-name="First_20_line_20_indent" style:list-style-name="Numbering_20_123"/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loext:num-list-format="%1%.%2%.%3%.%4%." style:num-suffix="." style:num-format="1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loext:num-list-format="%1%.%2%.%3%.%4%.%5%." style:num-suffix="." style:num-format="1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loext:num-list-format="%1%.%2%.%3%.%4%.%5%.%6%.%7%.%8%.%9%.%10%." style:num-suffix="." style:num-format="1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23T06:57:45.557472200</meta:creation-date>
    <dc:date>2026-07-01T21:27:12.839491220</dc:date>
    <meta:editing-duration>PT1M9S</meta:editing-duration>
    <meta:editing-cycles>2</meta:editing-cycles>
    <meta:generator>LibreOffice/25.8.3.2$Linux_X86_64 LibreOffice_project/580$Build-2</meta:generator>
    <meta:document-statistic meta:table-count="0" meta:image-count="0" meta:object-count="0" meta:page-count="2" meta:paragraph-count="23" meta:word-count="189" meta:character-count="1543" meta:non-whitespace-character-count="1398"/>
  </office:meta>
</office:document-meta>
</file>