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Первая_20_строка_20_с_20_отступом_20__28_нумерованный_29_" style:master-page-name="First_20_Page">
      <style:paragraph-properties style:page-number="auto"/>
    </style:style>
    <style:style style:name="P2" style:family="paragraph" style:parent-style-name="First_20_line_20_indent">
      <style:text-properties fo:language="en" fo:country="US" officeooo:rsid="00124078" officeooo:paragraph-rsid="00124078"/>
    </style:style>
    <style:style style:name="P3" style:family="paragraph" style:parent-style-name="First_20_line_20_indent">
      <style:text-properties fo:language="ru" fo:country="RU" officeooo:rsid="00149e21" officeooo:paragraph-rsid="00149e21"/>
    </style:style>
    <style:style style:name="P4" style:family="paragraph" style:parent-style-name="Первая_20_строка_20_с_20_отступом_20__28_нумерованный_29_">
      <style:text-properties officeooo:rsid="0012b6d0" officeooo:paragraph-rsid="0012b6d0"/>
    </style:style>
    <style:style style:name="P5" style:family="paragraph" style:parent-style-name="Первая_20_строка_20_с_20_отступом_20__28_нумерованный_29_">
      <style:text-properties fo:language="ru" fo:country="RU" officeooo:rsid="001e9212" officeooo:paragraph-rsid="001e9212"/>
    </style:style>
    <style:style style:name="P6" style:family="paragraph" style:parent-style-name="Листинг">
      <style:text-properties fo:language="en" fo:country="US" officeooo:rsid="001e9212" officeooo:paragraph-rsid="001e9212"/>
    </style:style>
    <style:style style:name="P7" style:family="paragraph" style:parent-style-name="First_20_line_20_indent">
      <style:text-properties fo:language="ru" fo:country="RU" officeooo:rsid="001e9212" officeooo:paragraph-rsid="001e9212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50e6c" officeooo:paragraph-rsid="00150e6c"/>
    </style:style>
    <style:style style:name="P9" style:family="paragraph" style:parent-style-name="First_20_line_20_indent">
      <style:text-properties fo:language="ru" fo:country="RU" officeooo:rsid="00170438" officeooo:paragraph-rsid="00170438"/>
    </style:style>
    <style:style style:name="P10" style:family="paragraph" style:parent-style-name="First_20_line_20_indent">
      <style:text-properties fo:language="ru" fo:country="RU" officeooo:rsid="00124078" officeooo:paragraph-rsid="00124078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en" fo:country="US" officeooo:rsid="00124fbc"/>
    </style:style>
    <style:style style:name="T4" style:family="text">
      <style:text-properties fo:language="en" fo:country="US" officeooo:rsid="001e9212"/>
    </style:style>
    <style:style style:name="T5" style:family="text">
      <style:text-properties fo:language="ru" fo:country="RU" officeooo:rsid="001e9212"/>
    </style:style>
    <style:style style:name="T6" style:family="text">
      <style:text-properties officeooo:rsid="001fe055"/>
    </style:style>
    <style:style style:name="T7" style:family="text">
      <style:text-properties fo:language="ru" fo:country="RU" officeooo:rsid="001fe055"/>
    </style:style>
    <style:style style:name="T8" style:family="text">
      <style:text-properties fo:language="en" fo:country="US" officeooo:rsid="001fe055"/>
    </style:style>
    <style:style style:name="T9" style:family="text">
      <style:text-properties officeooo:rsid="00224303"/>
    </style:style>
    <style:style style:name="T10" style:family="text">
      <style:text-properties officeooo:rsid="0023faf7"/>
    </style:style>
    <style:style style:name="T11" style:family="text">
      <style:text-properties fo:language="ru" fo:country="RU" officeooo:rsid="0023d240"/>
    </style:style>
    <style:style style:name="T12" style:family="text">
      <style:text-properties officeooo:rsid="00150e6c"/>
    </style:style>
    <style:style style:name="T13" style:family="text">
      <style:text-properties officeooo:rsid="001aeeaf"/>
    </style:style>
    <style:style style:name="T14" style:family="text">
      <style:text-properties fo:language="en" fo:country="US" officeooo:rsid="001aeeaf"/>
    </style:style>
    <style:style style:name="T15" style:family="text">
      <style:text-properties fo:language="ru" fo:country="RU" officeooo:rsid="001aeeaf"/>
    </style:style>
    <style:style style:name="T16" style:family="text">
      <style:text-properties fo:language="ru" fo:country="RU" officeooo:rsid="001b0010"/>
    </style:style>
    <style:style style:name="T17" style:family="text">
      <style:text-properties fo:language="ru" fo:country="RU" officeooo:rsid="001cb02b"/>
    </style:style>
    <style:style style:name="T18" style:family="text">
      <style:text-properties officeooo:rsid="001b0010"/>
    </style:style>
    <style:style style:name="T19" style:family="text">
      <style:text-properties officeooo:rsid="00183fa1"/>
    </style:style>
    <style:style style:name="T20" style:family="text">
      <style:text-properties fo:language="en" fo:country="US" officeooo:rsid="00183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23">
        <text:list-item>
          <text:p text:style-name="P1">Создать и настроить виртуальную машину для <text:span text:style-name="T1">VirtualBox </text:span><text:span text:style-name="T2">для установки операционной системы </text:span><text:span text:style-name="T1">AstraLinux.</text:span></text:p>
        </text:list-item>
      </text:list>
      <text:p text:style-name="P2"/>
      <text:list text:continue-numbering="true" text:style-name="Numbering_20_123">
        <text:list-item>
          <text:p text:style-name="Первая_20_строка_20_с_20_отступом_20__28_нумерованный_29_">Установить и настроить операционную систему <text:span text:style-name="T1">AstraLinux.</text:span></text:p>
        </text:list-item>
      </text:list>
      <text:p text:style-name="P3">Проверить установленную версию можно с помощью команды:</text:p>
      <text:p text:style-name="Листинг"><text:span text:style-name="Source_20_Text">cat /etc/astra_version</text:span></text:p>
      <text:list text:continue-numbering="true" text:style-name="Numbering_20_123">
        <text:list-item>
          <text:p text:style-name="Первая_20_строка_20_с_20_отступом_20__28_нумерованный_29_">Установить расширение<text:span text:style-name="T1"> VirtualBox</text:span><text:span text:style-name="T2"> для </text:span>гостевой операционной системы <text:span text:style-name="T1">AstraLinux.</text:span></text:p>
          <text:list>
            <text:list-item>
              <text:p text:style-name="Первая_20_строка_20_с_20_отступом_20__28_нумерованный_29_">Обновить список доступных пакетов из репозиториев.</text:p>
            </text:list-item>
          </text:list>
        </text:list-item>
      </text:list>
      <text:p text:style-name="Листинг"><text:span text:style-name="Source_20_Text">sudo apt update</text:span></text:p>
      <text:list text:continue-numbering="true" text:style-name="Numbering_20_123">
        <text:list-item>
          <text:list>
            <text:list-item>
              <text:p text:style-name="P4">Установить пакеты, необходимые для сборки модулей ядра операционной системы: 'linux-headers-'$(uname -r) – заголовочные файлы текущего ядра, build-essential – инструменты сборки, dkms – инфраструктура для поддержки динамически загружаемых модулей ядра.</text:p>
            </text:list-item>
          </text:list>
        </text:list-item>
      </text:list>
      <text:p text:style-name="Листинг"><text:span text:style-name="Source_20_Text"><text:span text:style-name="Source_20_Text"><text:span text:style-name="T3">sudo </text:span></text:span></text:span><text:span text:style-name="Source_20_Text">apt install 'linux-headers-'$(uname -r) build-essential dkms</text:span></text:p>
      <text:list text:continue-numbering="true" text:style-name="Numbering_20_123">
        <text:list-item>
          <text:list>
            <text:list-item>
              <text:p text:style-name="Первая_20_строка_20_с_20_отступом_20__28_нумерованный_29_">Подключить образ дополнений гостевой операционной системы.</text:p>
            </text:list-item>
            <text:list-item>
              <text:p text:style-name="P4">Установить дополнения гостевой операционной системы.</text:p>
            </text:list-item>
          </text:list>
        </text:list-item>
      </text:list>
      <text:p text:style-name="Листинг"><text:span text:style-name="Source_20_Text">sudo</text:span><text:span text:style-name="Source_20_Text"><text:span text:style-name="T1"> </text:span></text:span><text:span text:style-name="Source_20_Text"><text:span text:style-name="T3">sh</text:span></text:span><text:span text:style-name="Source_20_Text"><text:span text:style-name="T1"> </text:span></text:span><text:span text:style-name="Source_20_Text">/media/cdrom0/VBoxLinuxAdditions.run</text:span></text:p>
      <text:list text:continue-numbering="true" text:style-name="Numbering_20_123">
        <text:list-item>
          <text:list>
            <text:list-item>
              <text:p text:style-name="Первая_20_строка_20_с_20_отступом_20__28_нумерованный_29_">Перезапустить гостевую операционную систему.</text:p>
            </text:list-item>
            <text:list-item>
              <text:p text:style-name="P4">Включить двунаправленный общий буфер обмена.</text:p>
            </text:list-item>
            <text:list-item>
              <text:p text:style-name="P4">Добавить общую папку.</text:p>
            </text:list-item>
            <text:list-item>
              <text:p text:style-name="Первая_20_строка_20_с_20_отступом_20__28_нумерованный_29_">Добавить пользователя в группу <text:span text:style-name="T1">vboxsf.</text:span></text:p>
            </text:list-item>
          </text:list>
        </text:list-item>
      </text:list>
      <text:p text:style-name="Листинг"><text:span text:style-name="Source_20_Text">sudo adduser &lt;имя_вашего_пользователя&gt; vboxsf</text:span></text:p>
      <text:list text:continue-numbering="true" text:style-name="Numbering_20_123">
        <text:list-item>
          <text:list>
            <text:list-item>
              <text:p text:style-name="Первая_20_строка_20_с_20_отступом_20__28_нумерованный_29_">Перезапустить гостевую операционную систему.</text:p>
            </text:list-item>
          </text:list>
        </text:list-item>
        <text:list-item>
          <text:p text:style-name="Первая_20_строка_20_с_20_отступом_20__28_нумерованный_29_">Проверить наличие и версию интерпретатора <text:span text:style-name="T1">Python, в случае отсутствия установить из репозитория или скомпилировать из исходного кода.</text:span></text:p>
          <text:list>
            <text:list-item>
              <text:p text:style-name="P5">Проверить наличие и версию интерпретатора <text:span text:style-name="T1">Python </text:span>можно с помощью команды:</text:p>
            </text:list-item>
          </text:list>
        </text:list-item>
      </text:list>
      <text:p text:style-name="P6">python3 --version</text:p>
      <text:list text:continue-numbering="true" text:style-name="Numbering_20_123">
        <text:list-item>
          <text:list>
            <text:list-item>
              <text:p text:style-name="P5"><text:soft-page-break/>Установить интерпретатор <text:span text:style-name="T1">Python </text:span>из репозитория <text:span text:style-name="T1">Astra Linux </text:span>можно с помощью команды:</text:p>
            </text:list-item>
          </text:list>
        </text:list-item>
      </text:list>
      <text:p text:style-name="Листинг">sudo apt install python3</text:p>
      <text:p text:style-name="P7">После установки нужно проверить версию <text:span text:style-name="T1">Python.</text:span> В состав репозитория <text:span text:style-name="T1">Astra Linux Common Edition 2.12.46 (orel) </text:span>входит интерпретатор <text:span text:style-name="T1">Python 3.5.3, </text:span>7 октября 2025 г. выпущена версия 3.14.0.</text:p>
      <text:list text:continue-numbering="true" text:style-name="Numbering_20_123">
        <text:list-item>
          <text:list>
            <text:list-item>
              <text:p text:style-name="Первая_20_строка_20_с_20_отступом_20__28_нумерованный_29_">Для установки последней версии <text:span text:style-name="T4">Python</text:span> или в случае недоступности <text:span text:style-name="T4">Python</text:span> в репозитории дистрибутива, можно скомпилировать и установить его из исходного кода:</text:p>
              <text:list>
                <text:list-item>
                  <text:p text:style-name="Первая_20_строка_20_с_20_отступом_20__28_нумерованный_29_">Установить необходимые пакеты для сборки Python из исходников<text:span text:style-name="T5">:</text:span></text:p>
                </text:list-item>
              </text:list>
            </text:list-item>
          </text:list>
        </text:list-item>
      </text:list>
      <text:p text:style-name="Листинг">sudo apt install build-essential libssl-dev libsqlite3-dev libbz2-dev libgdbm-dev libncurses5-dev libncursesw5-dev libreadline-dev zlib1g-dev libffi-dev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Скачать архив с исходным кодом Python с официального сайта, <text:span text:style-name="T6">7 октября 2025 г. выпущена версия 3.14.0</text:span>:</text:p>
                </text:list-item>
              </text:list>
            </text:list-item>
          </text:list>
        </text:list-item>
      </text:list>
      <text:p text:style-name="Листинг">wget https://www.python.org/ftp/python/3.1<text:span text:style-name="T6">4</text:span>.<text:span text:style-name="T6">0</text:span>/Python-<text:line-break/>3.1<text:span text:style-name="T6">4</text:span>.<text:span text:style-name="T6">0</text:span>.tgz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Распаковать архив<text:span text:style-name="T7">:</text:span></text:p>
                </text:list-item>
              </text:list>
            </text:list-item>
          </text:list>
        </text:list-item>
      </text:list>
      <text:p text:style-name="Листинг"><text:span text:style-name="T6">sudo </text:span>tar -xzf Python-<text:span text:style-name="T1">3.1</text:span><text:span text:style-name="T8">4</text:span><text:span text:style-name="T1">.</text:span><text:span text:style-name="T8">0</text:span>.tgz -<text:span text:style-name="T6">C /opt</text:span>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Перейти в директорию, созданную при распаковке архива:</text:p>
                </text:list-item>
              </text:list>
            </text:list-item>
          </text:list>
        </text:list-item>
      </text:list>
      <text:p text:style-name="Листинг">cd /opt/Python-3.14.0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Подготовить исходный код для компиляции:</text:p>
                </text:list-item>
              </text:list>
            </text:list-item>
          </text:list>
        </text:list-item>
      </text:list>
      <text:p text:style-name="Листинг">sudo ./configure --enable-optimizations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Скомпилировать исходный код Python с помощью команды:</text:p>
                </text:list-item>
              </text:list>
            </text:list-item>
          </text:list>
        </text:list-item>
      </text:list>
      <text:p text:style-name="Листинг"><text:span text:style-name="T9">sudo </text:span>make -j $(nproc)</text:p>
      <text:p text:style-name="P2">Опция -j $(nproc) ускоряет процесс компиляции, используя все доступные ядра.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Установить Python после компиляции:</text:p>
                </text:list-item>
              </text:list>
            </text:list-item>
          </text:list>
        </text:list-item>
      </text:list>
      <text:p text:style-name="Листинг">sudo make altinstall</text:p>
      <text:p text:style-name="P2">Использовать <text:span text:style-name="Source_20_Text">altinstall</text:span> вместо <text:span text:style-name="Source_20_Text">install</text:span>, чтобы не заменить стандартную версию Python в системе.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<text:soft-page-break/>Проверить установленную версию <text:span text:style-name="T1">Python:</text:span></text:p>
                </text:list-item>
              </text:list>
            </text:list-item>
          </text:list>
        </text:list-item>
      </text:list>
      <text:p text:style-name="Листинг">python3.1<text:span text:style-name="T10">4</text:span> --version</text:p>
      <text:p text:style-name="P2">Если установка была успешной, должна быть указана версия Python <text:span text:style-name="T2">3.1</text:span><text:span text:style-name="T11">4</text:span><text:span text:style-name="T2">.</text:span><text:span text:style-name="T11">0</text:span>.</text:p>
      <text:list text:continue-numbering="true" text:style-name="Numbering_20_123">
        <text:list-item>
          <text:p text:style-name="Первая_20_строка_20_с_20_отступом_20__28_нумерованный_29_">Проверить наличие и версию системы управления пакетами <text:span text:style-name="T1">Pip, </text:span>в случае отсутствия установить<text:span text:style-name="T1">.</text:span></text:p>
        </text:list-item>
      </text:list>
      <text:p text:style-name="P2"/>
      <text:list text:continue-numbering="true" text:style-name="Numbering_20_123">
        <text:list-item>
          <text:p text:style-name="Первая_20_строка_20_с_20_отступом_20__28_нумерованный_29_">Проверить наличие и версию системы контроля версий <text:span text:style-name="T1">Git, </text:span>в случае отсутствия установить <text:span text:style-name="T12">из репозитория или скомпилировать из исходного кода</text:span>.</text:p>
          <text:list>
            <text:list-item>
              <text:p text:style-name="Первая_20_строка_20_с_20_отступом_20__28_нумерованный_29_">Проверить наличие и версию системы контроля версий <text:span text:style-name="T1">Git </text:span>можно с помощью команды:</text:p>
            </text:list-item>
          </text:list>
        </text:list-item>
      </text:list>
      <text:p text:style-name="Листинг"><text:span text:style-name="Source_20_Text">git --version</text:span></text:p>
      <text:list text:continue-numbering="true" text:style-name="Numbering_20_123">
        <text:list-item>
          <text:list>
            <text:list-item>
              <text:p text:style-name="P8">Установить из репозитория <text:span text:style-name="T1">Astra Linux </text:span>систему контроля версий <text:span text:style-name="T1">Git </text:span>можно с помощью команды:</text:p>
            </text:list-item>
          </text:list>
        </text:list-item>
      </text:list>
      <text:p text:style-name="Листинг"><text:span text:style-name="Source_20_Text">sudo apt install git</text:span></text:p>
      <text:p text:style-name="P9">После установки нужно проверить версию <text:span text:style-name="T1">Git.</text:span></text:p>
      <text:list text:continue-numbering="true" text:style-name="Numbering_20_123">
        <text:list-item>
          <text:list>
            <text:list-item>
              <text:p text:style-name="Первая_20_строка_20_с_20_отступом_20__28_нумерованный_29_">Для установки последней версии <text:span text:style-name="T1">Git </text:span>или в случае недоступности <text:span text:style-name="T1">Git </text:span>в репозитории дистрибутива, можно скомпилировать и установить его из исходного кода:</text:p>
              <text:list>
                <text:list-item>
                  <text:p text:style-name="Первая_20_строка_20_с_20_отступом_20__28_нумерованный_29_">Установить зависимости для сборки Git из исходного кода:</text:p>
                </text:list-item>
              </text:list>
            </text:list-item>
          </text:list>
        </text:list-item>
      </text:list>
      <text:p text:style-name="Листинг"><text:span text:style-name="Source_20_Text">sudo apt install build-essential libssl-dev libcurl4-gnutls-dev libexpat1-dev gettextz lib1g-dev</text:span>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Скачать актуальную версию Git для Linux-систем, <text:span text:style-name="T13">18 августа 2025 г. выпущена</text:span><text:span text:style-name="T14"> </text:span><text:span text:style-name="T15">версия 2.51.0, </text:span><text:span text:style-name="T16">но удалось собрать версию 2.46.0, достаточн</text:span><text:span text:style-name="T17">ую</text:span><text:span text:style-name="T16"> для работы</text:span>:</text:p>
                </text:list-item>
              </text:list>
            </text:list-item>
          </text:list>
        </text:list-item>
      </text:list>
      <text:p text:style-name="Листинг"><text:span text:style-name="Source_20_Text">wget https://www.kernel.org/pub/software/scm/git/git-<text:line-break/>2.</text:span><text:span text:style-name="Source_20_Text"><text:span text:style-name="T18">46</text:span></text:span><text:span text:style-name="Source_20_Text">.0.tar.gz</text:span>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Распаковать загруженный архив:</text:p>
                </text:list-item>
              </text:list>
            </text:list-item>
          </text:list>
        </text:list-item>
      </text:list>
      <text:p text:style-name="Листинг"><text:span text:style-name="Source_20_Text"><text:span text:style-name="Source_20_Text"><text:span text:style-name="T14">sudo </text:span></text:span></text:span><text:span text:style-name="Source_20_Text">tar -xzf git-2.</text:span><text:span text:style-name="Source_20_Text"><text:span text:style-name="T18">46</text:span></text:span><text:span text:style-name="Source_20_Text">.0.tar.gz -C /</text:span><text:span text:style-name="Source_20_Text"><text:span text:style-name="T13">o</text:span></text:span><text:span text:style-name="Source_20_Text"><text:span text:style-name="T14">pt</text:span></text:span>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Перейти в директорию, созданную при распаковке архива:</text:p>
                </text:list-item>
              </text:list>
            </text:list-item>
          </text:list>
        </text:list-item>
      </text:list>
      <text:p text:style-name="Листинг"><text:span text:style-name="Source_20_Text">cd /</text:span><text:span text:style-name="Source_20_Text"><text:span text:style-name="T14">opt/</text:span></text:span><text:span text:style-name="Source_20_Text">git-2.</text:span><text:span text:style-name="Source_20_Text"><text:span text:style-name="T18">46</text:span></text:span><text:span text:style-name="Source_20_Text">.0</text:span>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Скомпилировать Git с помощью утилиты make:</text:p>
                </text:list-item>
              </text:list>
            </text:list-item>
          </text:list>
        </text:list-item>
      </text:list>
      <text:p text:style-name="Листинг"><text:soft-page-break/><text:span text:style-name="Source_20_Text">sudo make prefix=/usr/local all</text:span>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Запустить установку ранее скомпилированного программного обеспечения:</text:p>
                </text:list-item>
              </text:list>
            </text:list-item>
          </text:list>
        </text:list-item>
      </text:list>
      <text:p text:style-name="Листинг"><text:span text:style-name="Source_20_Text">sudo make prefix=/usr/local install</text:span>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Перезапустить текущую оболочку, чтобы изменения вступили в силу:</text:p>
                </text:list-item>
              </text:list>
            </text:list-item>
          </text:list>
        </text:list-item>
      </text:list>
      <text:p text:style-name="Листинг"><text:span text:style-name="Source_20_Text">exec bash</text:span></text:p>
      <text:list text:continue-numbering="true" text:style-name="Numbering_20_123">
        <text:list-item>
          <text:list>
            <text:list-item>
              <text:list>
                <text:list-item>
                  <text:p text:style-name="Первая_20_строка_20_с_20_отступом_20__28_нумерованный_29_">Проверить, что в системе установлена требуемая версия Git.</text:p>
                </text:list-item>
              </text:list>
            </text:list-item>
          </text:list>
        </text:list-item>
        <text:list-item>
          <text:p text:style-name="Первая_20_строка_20_с_20_отступом_20__28_нумерованный_29_">Загрузить архив интегрированной среды разработки <text:span text:style-name="T19">O</text:span><text:span text:style-name="T20">penIDE</text:span><text:span text:style-name="T1">,</text:span> установить<text:line-break/>и настроить для работы в гостевой операционной системе<text:span text:style-name="T1"> AstraLinux </text:span>программное обеспечение из него.</text:p>
        </text:list-item>
      </text:list>
      <text:p text:style-name="P10"/>
      <text:list text:continue-numbering="true" text:style-name="Numbering_20_123">
        <text:list-item>
          <text:p text:style-name="Первая_20_строка_20_с_20_отступом_20__28_нумерованный_29_">Подключиться к веб-сервису для совместной разработки проектов <text:span text:style-name="T1">GitHub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Листинг" style:family="paragraph" style:parent-style-name="Standard" style:master-page-name="">
      <style:paragraph-properties fo:margin-left="1.251cm" fo:margin-top="0cm" fo:margin-bottom="0.21cm" style:contextual-spacing="false" style:page-number="auto" fo:padding="0.049cm" fo:border-left="none" fo:border-right="none" fo:border-top="0.06pt solid #000000" fo:border-bottom="0.51pt solid #000000"/>
      <style:text-properties style:font-name="Liberation Mono1" fo:font-family="'Liberation Mono'" style:font-style-name="Обычный" style:font-family-generic="modern" style:font-pitch="fixe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18:03:09.297675900</meta:creation-date>
    <meta:editing-duration>PT51M17S</meta:editing-duration>
    <meta:editing-cycles>11</meta:editing-cycles>
    <meta:generator>LibreOffice/25.8.1.1$Windows_X86_64 LibreOffice_project/54047653041915e595ad4e45cccea684809c77b5</meta:generator>
    <dc:title>my_default</dc:title>
    <dc:date>2025-10-14T21:13:52.426613700</dc:date>
    <meta:document-statistic meta:table-count="0" meta:image-count="0" meta:object-count="0" meta:page-count="4" meta:paragraph-count="70" meta:word-count="586" meta:character-count="4622" meta:non-whitespace-character-count="4146"/>
    <meta:template xlink:type="simple" xlink:actuate="onRequest" xlink:title="my_default" xlink:href="../../../AppData/Roaming/LibreOffice/4/user/template/my_default.ott" meta:date="2025-10-11T18:03:08.082075000"/>
  </office:meta>
</office:document-meta>
</file>