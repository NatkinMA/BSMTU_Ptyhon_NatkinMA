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officeooo:rsid="00148a91" officeooo:paragraph-rsid="00148a91"/>
    </style:style>
    <style:style style:name="P2" style:family="paragraph" style:parent-style-name="Heading_20_1">
      <style:text-properties fo:language="ru" fo:country="RU" officeooo:rsid="00194abe" officeooo:paragraph-rsid="00194abe"/>
    </style:style>
    <style:style style:name="P3" style:family="paragraph" style:parent-style-name="Heading_20_2">
      <style:text-properties officeooo:rsid="00148a91" officeooo:paragraph-rsid="00148a91"/>
    </style:style>
    <style:style style:name="P4" style:family="paragraph" style:parent-style-name="First_20_line_20_indent">
      <style:text-properties officeooo:paragraph-rsid="00154991"/>
    </style:style>
    <style:style style:name="P5" style:family="paragraph" style:parent-style-name="Первая_20_строка_20_с_20_отступом_20__28_нумерованный_29_">
      <style:text-properties officeooo:rsid="00154991" officeooo:paragraph-rsid="00194abe"/>
    </style:style>
    <style:style style:name="P6" style:family="paragraph" style:parent-style-name="Первая_20_строка_20_с_20_отступом_20__28_нумерованный_29_">
      <style:text-properties fo:language="ru" fo:country="RU" officeooo:rsid="00206a77" officeooo:paragraph-rsid="00206a77"/>
    </style:style>
    <style:style style:name="P7" style:family="paragraph" style:parent-style-name="Первая_20_строка_20_с_20_отступом_20__28_нумерованный_29_">
      <style:text-properties fo:language="ru" fo:country="RU" officeooo:rsid="00150224" officeooo:paragraph-rsid="00150224"/>
    </style:style>
    <style:style style:name="T1" style:family="text">
      <style:text-properties fo:language="en" fo:country="US" officeooo:rsid="00194abe"/>
    </style:style>
    <style:style style:name="T2" style:family="text">
      <style:text-properties fo:language="en" fo:country="US" officeooo:rsid="001f5c5b"/>
    </style:style>
    <style:style style:name="T3" style:family="text">
      <style:text-properties officeooo:rsid="00206a77"/>
    </style:style>
    <style:style style:name="T4" style:family="text">
      <style:text-properties fo:language="en" fo:country="US"/>
    </style:style>
    <style:style style:name="T5" style:family="text">
      <style:text-properties officeooo:rsid="00148a91"/>
    </style:style>
    <style:style style:name="T6" style:family="text">
      <style:text-properties fo:language="ru" fo:country="RU" officeooo:rsid="00194abe"/>
    </style:style>
    <style:style style:name="T7" style:family="text">
      <style:text-properties fo:language="ru" fo:country="RU" officeooo:rsid="00206a77"/>
    </style:style>
    <style:style style:name="T8" style:family="text">
      <style:text-properties officeooo:rsid="00194ab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 <text:span text:style-name="T1">1</text:span><text:span text:style-name="T2">3</text:span></text:p>
      <text:h text:style-name="P2" text:outline-level="1"><text:span text:style-name="T3">Виртуальное окружение</text:span> <text:span text:style-name="T4">Python</text:span></text:h>
      <text:h text:style-name="P3" text:outline-level="2">Цель работы</text:h>
      <text:p text:style-name="P4"><text:span text:style-name="T5">Дать студентам практический навык </text:span><text:span text:style-name="T6">использования </text:span><text:span text:style-name="T7">виртуального окружения</text:span><text:span text:style-name="T6"> языка программирования </text:span><text:span text:style-name="T1">Python </text:span><text:span text:style-name="T6">для организации программного кода в проектах.</text:span></text:p>
      <text:h text:style-name="P3" text:outline-level="2">Постановка задачи</text:h>
      <text:list text:style-name="Numbering_20_123">
        <text:list-item>
          <text:p text:style-name="P5"><text:span text:style-name="T8">Создать </text:span><text:span text:style-name="T3">и активировать</text:span><text:span text:style-name="T8"> собственн</text:span><text:span text:style-name="T3">ое</text:span><text:span text:style-name="T8"> </text:span><text:span text:style-name="T3">виртуальное окружение для каталога<text:line-break/>с лабораторной работой № 13.</text:span></text:p>
        </text:list-item>
        <text:list-item>
          <text:p text:style-name="P6">Установить использовавшиеся в лабораторной работе № 9 пакеты <text:span text:style-name="T4">LLVMlite </text:span>и <text:span text:style-name="T4">RPLY.</text:span></text:p>
        </text:list-item>
        <text:list-item>
          <text:p text:style-name="P6">Перенести программу из лабораторной работы № 9 в каталог лабораторной работы № 13 и запустить его.</text:p>
        </text:list-item>
        <text:list-item>
          <text:p text:style-name="P6">Сформировать файл requirements.txt для переноса проекта.</text:p>
        </text:list-item>
        <text:list-item>
          <text:p text:style-name="P7">Оформить отчет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chapter" style:master-page-name="">
      <style:paragraph-properties fo:margin-top="0cm" fo:margin-bottom="0cm" style:contextual-spacing="false" fo:text-align="center" style:justify-single-word="false" style:page-number="auto" fo:keep-with-next="always"/>
      <style:text-properties style:font-name="Liberation Serif1" fo:font-family="'Liberation Serif'" style:font-style-name="Жирный" style:font-family-generic="roman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2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6T06:01:26.391414900</meta:creation-date>
    <meta:editing-duration>PT59M49S</meta:editing-duration>
    <meta:editing-cycles>9</meta:editing-cycles>
    <meta:generator>LibreOffice/26.2.1.2$Windows_X86_64 LibreOffice_project/620$Build-2</meta:generator>
    <dc:title>my_default</dc:title>
    <dc:date>2026-03-21T06:23:59.519506300</dc:date>
    <meta:document-statistic meta:table-count="0" meta:image-count="0" meta:object-count="0" meta:page-count="1" meta:paragraph-count="11" meta:word-count="81" meta:character-count="581" meta:non-whitespace-character-count="516"/>
    <meta:template xlink:type="simple" xlink:actuate="onRequest" xlink:title="my_default" xlink:href="../../../AppData/Roaming/LibreOffice/4/user/template/my_default.ott" meta:date="2025-09-06T06:01:25.350303800"/>
  </office:meta>
</office:document-meta>
</file>