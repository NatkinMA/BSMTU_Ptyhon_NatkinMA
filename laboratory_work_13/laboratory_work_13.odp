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68000001E4DCC578D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fo:min-height="0.101cm" loext:decorative="false"/>
      <style:paragraph-properties style:writing-mode="lr-tb"/>
    </style:style>
    <style:style style:name="pr5" style:family="presentation" style:parent-style-name="Vivid1-outline1">
      <style:graphic-properties fo:min-height="0.101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36pt"/>
    </style:style>
    <style:style style:name="P5" style:family="paragraph">
      <loext:graphic-properties draw:fill-color="#ffffff"/>
      <style:text-properties fo:font-size="36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1" draw:layer="layout" svg:width="25.2cm" svg:height="9cm" svg:x="1.4cm" svg:y="0.75cm" presentation:class="title" presentation:user-transformed="true">
          <draw:text-box>
            <text:p><text:span text:style-name="T1">Виртуальное окружение</text:span><text:span text:style-name="T1"><text:line-break/></text:span><text:span text:style-name="T1">Python</text:span></text:p>
          </draw:text-box>
        </draw:frame>
        <draw:frame presentation:style-name="pr2" draw:text-style-name="P2" draw:layer="layout" svg:width="25.2cm" svg:height="3.25cm" svg:x="1.4cm" svg:y="10.75cm" presentation:class="subtitle" presentation:user-transformed="true">
          <draw:text-box>
            <text:p>Языки программирования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3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Виртуальное окружение Python</text:p>
          </draw:text-box>
        </draw:frame>
        <draw:frame presentation:style-name="pr5" draw:layer="layout" svg:width="12.297cm" svg:height="9.75cm" svg:x="1.4cm" svg:y="4cm" presentation:class="outline">
          <draw:text-box>
            <text:list text:style-name="L2">
              <text:list-item>
                <text:p>Виртуальное окружение Python (venv) — это изолированная папка, содержащая собственную копию интерпретатора Python и библиотек;</text:p>
              </text:list-item>
              <text:list-item>
                <text:p>Зачем использовать:</text:p>
                <text:list>
                  <text:list-item>
                    <text:p>Изоляция: Разные проекты могут использовать разные версии библиотек (например, Django 2.2 и 4.0) без конфликтов,</text:p>
                  </text:list-item>
                  <text:list-item>
                    <text:p>Чистота: Глобальный Python не засоряется тысячами пакетов для разных нужд,</text:p>
                  </text:list-item>
                  <text:list-item>
                    <text:p>Управление версиями: Легко создать файл requirements.txt для переноса проекта, который гарантирует одинаковую работу кода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648cm" svg:height="8.365cm" svg:x="15.352cm" svg:y="4.5cm">
          <draw:image xlink:href="Pictures/1000000100000268000001E4DCC578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3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Виртуальное окружение Python</text:p>
          </draw:text-box>
        </draw:frame>
        <draw:frame presentation:style-name="pr5" draw:layer="layout" svg:width="12.297cm" svg:height="12cm" svg:x="1.4cm" svg:y="3.5cm" presentation:class="outline" presentation:user-transformed="true">
          <draw:text-box>
            <text:list text:style-name="L2">
              <text:list-item>
                <text:p>Создание:</text:p>
                <text:p>python -m venv venv</text:p>
              </text:list-item>
              <text:list-item>
                <text:p>Активация:</text:p>
                <text:p>venv\Scripts\activate</text:p>
              </text:list-item>
              <text:list-item>
                <text:p>Установка пакетов:</text:p>
                <text:p>pip install название_библиотеки</text:p>
              </text:list-item>
              <text:list-item>
                <text:p>Создание файла настроек:</text:p>
                <text:p>pip freeze &gt; requirements.txt</text:p>
              </text:list-item>
              <text:list-item>
                <text:p>Деактивация:</text:p>
                <text:p>deactivate</text:p>
              </text:list-item>
            </text:list>
          </draw:text-box>
        </draw:frame>
        <draw:frame draw:style-name="gr2" draw:text-style-name="P3" draw:layer="layout" svg:width="10.648cm" svg:height="8.365cm" svg:x="15.352cm" svg:y="4.5cm">
          <draw:image xlink:href="Pictures/1000000100000268000001E4DCC578D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3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Виртуальное окружение Python</text:p>
          </draw:text-box>
        </draw:frame>
        <draw:frame presentation:style-name="pr5" draw:layer="layout" svg:width="12.297cm" svg:height="11.5cm" svg:x="1.4cm" svg:y="3.5cm" presentation:class="outline" presentation:user-transformed="true">
          <draw:text-box>
            <text:list text:style-name="L2">
              <text:list-item>
                <text:p>В папке bin размещаются исполняемые файлы и сценарии (в Windows вместо неё используется папка Scripts).</text:p>
              </text:list-item>
              <text:list-item>
                <text:p>Папка include содержит файлы, необходимые для компиляции некоторых пакетов.</text:p>
              </text:list-item>
              <text:list-item>
                <text:p>В каталогах lib и lib64 располагаются установленные библиотеки.</text:p>
              </text:list-item>
              <text:list-item>
                <text:p>Файл pyvenv.cfg хранит настройки, используемые при активации среды.</text:p>
              </text:list-item>
            </text:list>
          </draw:text-box>
        </draw:frame>
        <draw:frame draw:style-name="gr2" draw:text-style-name="P3" draw:layer="layout" svg:width="10.648cm" svg:height="8.365cm" svg:x="15.352cm" svg:y="4.5cm">
          <draw:image xlink:href="Pictures/1000000100000268000001E4DCC578D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" presentation:presentation-page-layout-name="AL1T0">
        <office:forms form:automatic-focus="false" form:apply-design-mode="false"/>
        <draw:frame presentation:style-name="pr1" draw:text-style-name="P1" draw:layer="layout" svg:width="25.2cm" svg:height="9cm" svg:x="1.4cm" svg:y="0.75cm" presentation:class="title" presentation:user-transformed="true">
          <draw:text-box>
            <text:p><text:span text:style-name="T1">Виртуальное окружение</text:span><text:span text:style-name="T1"><text:line-break/></text:span><text:span text:style-name="T1">Python</text:span></text:p>
          </draw:text-box>
        </draw:frame>
        <draw:frame presentation:style-name="pr2" draw:text-style-name="P5" draw:layer="layout" svg:width="25.2cm" svg:height="3.25cm" svg:x="1.4cm" svg:y="10.75cm" presentation:class="subtitle" presentation:user-transformed="true">
          <draw:text-box>
            <text:p text:style-name="P4">Языки программирования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ru" fo:country="RU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lef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номер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6T09:27:22.351266900</meta:creation-date>
    <dc:description>This work is licensed under a Creative Commons 0 License.
It makes use of the works of fsanchez.</dc:description>
    <meta:generator>LibreOffice/26.2.1.2$Windows_X86_64 LibreOffice_project/620$Build-2</meta:generator>
    <dc:title>Vivid</dc:title>
    <meta:editing-duration>PT43M</meta:editing-duration>
    <meta:editing-cycles>8</meta:editing-cycles>
    <dc:date>2026-03-21T06:23:32.939254400</dc:date>
    <meta:document-statistic meta:object-count="67"/>
  </office:meta>
</office:document-meta>
</file>