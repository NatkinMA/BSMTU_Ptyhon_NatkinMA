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8000003000D44D18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36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><text:span text:style-name="T1">Классы в Python</text:span></text:p>
          </draw:text-box>
        </draw:frame>
        <draw:frame presentation:style-name="pr2" draw:text-style-name="P2" draw:layer="layout" svg:width="25.2cm" svg:height="3.25cm" svg:x="1.4cm" svg:y="10.75cm" presentation:class="subtitle" presentation:user-transformed="true">
          <draw:text-box>
            <text:p>Языки программирования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Классы в Python</text:p>
          </draw:text-box>
        </draw:frame>
        <draw:frame presentation:style-name="pr5" draw:layer="layout" svg:width="12.297cm" svg:height="9.75cm" svg:x="1.4cm" svg:y="4cm" presentation:class="outline" presentation:user-transformed="true">
          <draw:text-box>
            <text:list text:style-name="L2">
              <text:list-item>
                <text:p>Классы в Python — это шаблоны или «чертежи» для создания объектов. Они лежат в основе объектно-ориентированного программирования (ООП), позволяя группировать данные (атрибуты) и функции (методы) в одну логическую единицу;</text:p>
              </text:list-item>
              <text:list-item>
                <text:p>Основные понятия:</text:p>
                <text:list>
                  <text:list-item>
                    <text:p>Класс (Class): Описание того, как должен выглядеть и что должен уметь объект (например, «Кот» как вид),</text:p>
                  </text:list-item>
                  <text:list-item>
                    <text:p>Объект/Экземпляр (Instance): Конкретное воплощение класса (например, ваш домашний кот Барсик),</text:p>
                  </text:list-item>
                  <text:list-item>
                    <text:p>Методы: Функции внутри класса, которые определяют поведение объекта,</text:p>
                  </text:list-item>
                  <text:list-item>
                    <text:p>Атрибуты: Переменные внутри класса, хранящие данные объекта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04cm" svg:height="10.159cm" svg:x="14.696cm" svg:y="3.841cm">
          <draw:image xlink:href="Pictures/10000001000003C8000003000D44D1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Классы в Python</text:p>
          </draw:text-box>
        </draw:frame>
        <draw:frame presentation:style-name="pr5" draw:layer="layout" svg:width="12.297cm" svg:height="9.75cm" svg:x="1.4cm" svg:y="4cm" presentation:class="outline" presentation:user-transformed="true">
          <draw:text-box>
            <text:list text:style-name="L2">
              <text:list-item>
                <text:p>Основные компоненты:</text:p>
                <text:list>
                  <text:list-item>
                    <text:p>Метод __init__: Это специальный конструктор, который автоматически вызывается при создании нового объекта,</text:p>
                  </text:list-item>
                  <text:list-item>
                    <text:p>Параметр self: Ссылка на текущий экземпляр класса. Она позволяет методам получать доступ к атрибутам и другим методам того же объекта.</text:p>
                  </text:list-item>
                  <text:list-item>
                    <text:p>Магические методы: Методы с двойным подчеркиванием (например, __str__, __eq__), которые позволяют определять поведение объектов в стандартных операциях (вывод текста, сравнение и т.д.)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04cm" svg:height="10.159cm" svg:x="14.696cm" svg:y="3.841cm">
          <draw:image xlink:href="Pictures/10000001000003C8000003000D44D18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Классы в Python</text:p>
          </draw:text-box>
        </draw:frame>
        <draw:frame presentation:style-name="pr5" draw:layer="layout" svg:width="12.297cm" svg:height="9.75cm" svg:x="1.4cm" svg:y="4cm" presentation:class="outline" presentation:user-transformed="true">
          <draw:text-box>
            <text:list text:style-name="L2">
              <text:list-item>
                <text:p>Зачем нужны классы:</text:p>
                <text:list>
                  <text:list-item>
                    <text:p>Инкапсуляция: Объединение данных и методов работы с ними в одном месте, скрывая детали реализации;</text:p>
                  </text:list-item>
                  <text:list-item>
                    <text:p>Наследование: Позволяет создавать новые классы на основе существующих, расширяя или изменяя их функционал.</text:p>
                  </text:list-item>
                  <text:list-item>
                    <text:p>Полиморфизм: Возможность использовать один и тот же интерфейс для объектов разных типов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04cm" svg:height="10.159cm" svg:x="14.696cm" svg:y="3.841cm">
          <draw:image xlink:href="Pictures/10000001000003C8000003000D44D18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><text:span text:style-name="T1">Классы в Python</text:span></text:p>
          </draw:text-box>
        </draw:frame>
        <draw:frame presentation:style-name="pr2" draw:text-style-name="P5" draw:layer="layout" svg:width="25.2cm" svg:height="3.25cm" svg:x="1.4cm" svg:y="10.75cm" presentation:class="subtitle" presentation:user-transformed="true">
          <draw:text-box>
            <text:p text:style-name="P4">Языки программирования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номер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6T09:27:22.351266900</meta:creation-date>
    <dc:description>This work is licensed under a Creative Commons 0 License.
It makes use of the works of fsanchez.</dc:description>
    <meta:generator>LibreOffice/26.2.1.2$Windows_X86_64 LibreOffice_project/620$Build-2</meta:generator>
    <dc:title>Vivid</dc:title>
    <meta:editing-duration>PT48M56S</meta:editing-duration>
    <meta:editing-cycles>9</meta:editing-cycles>
    <dc:date>2026-03-21T06:45:56.597732400</dc:date>
    <meta:document-statistic meta:object-count="67"/>
  </office:meta>
</office:document-meta>
</file>