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49402"/>
    </style:style>
    <style:style style:name="P6" style:family="paragraph" style:parent-style-name="Первая_20_строка_20_с_20_отступом_20__28_маркированный_29_">
      <style:text-properties fo:language="en" fo:country="US" officeooo:rsid="00249402" officeooo:paragraph-rsid="00249402"/>
    </style:style>
    <style:style style:name="P7" style:family="paragraph" style:parent-style-name="Первая_20_строка_20_с_20_отступом_20__28_маркированный_29_">
      <style:text-properties fo:language="ru" fo:country="RU" officeooo:rsid="00249402" officeooo:paragraph-rsid="00249402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 officeooo:rsid="00249402"/>
    </style:style>
    <style:style style:name="T3" style:family="text">
      <style:text-properties officeooo:rsid="0026890a"/>
    </style:style>
    <style:style style:name="T4" style:family="text">
      <style:text-properties officeooo:rsid="0021bbb4"/>
    </style:style>
    <style:style style:name="T5" style:family="text">
      <style:text-properties fo:language="en" fo:country="US"/>
    </style:style>
    <style:style style:name="T6" style:family="text">
      <style:text-properties officeooo:rsid="00148a91"/>
    </style:style>
    <style:style style:name="T7" style:family="text">
      <style:text-properties fo:language="ru" fo:country="RU" officeooo:rsid="00148a91"/>
    </style:style>
    <style:style style:name="T8" style:family="text">
      <style:text-properties fo:language="ru" fo:country="RU" officeooo:rsid="00249402"/>
    </style:style>
    <style:style style:name="T9" style:family="text">
      <style:text-properties fo:language="ru" fo:country="RU" officeooo:rsid="00194abe"/>
    </style:style>
    <style:style style:name="T10" style:family="text">
      <style:text-properties officeooo:rsid="00249402"/>
    </style:style>
    <style:style style:name="T1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6</text:span></text:p>
      <text:h text:style-name="P2" text:outline-level="1"><text:span text:style-name="T3">Регулярные выражения</text:span><text:span text:style-name="T4"> в</text:span> <text:span text:style-name="T5">Python</text:span></text:h>
      <text:h text:style-name="P3" text:outline-level="2">Цель работы</text:h>
      <text:p text:style-name="P4"><text:span text:style-name="T6">Дать студентам практический навык</text:span><text:span text:style-name="T7"> </text:span><text:span text:style-name="T2">п</text:span><text:span text:style-name="T8">рименения</text:span><text:span text:style-name="T9"> языка программирования </text:span><text:span text:style-name="T1">Python </text:span><text:span text:style-name="T9">для </text:span><text:span text:style-name="T8">работы с регулярными выражениями</text:span><text:span text:style-name="T9">.</text:span></text:p>
      <text:h text:style-name="P3" text:outline-level="2">Постановка задачи</text:h>
      <text:list xml:id="list2659576459" text:style-name="Numbering_20_123">
        <text:list-item>
          <text:p text:style-name="P5"><text:span text:style-name="T10">Написать программу на языке программирования </text:span><text:span text:style-name="T2">Python, </text:span><text:span text:style-name="T10">которая с помощью регулярных выражений извлекает из файла </text:span><text:span text:style-name="T2">input.txt </text:span><text:span text:style-name="T10">следующие данные:</text:span></text:p>
        </text:list-item>
      </text:list>
      <text:list text:style-name="List_20_2">
        <text:list-item>
          <text:p text:style-name="P6">IP-<text:span text:style-name="T11">адреса;</text:span></text:p>
        </text:list-item>
        <text:list-item>
          <text:p text:style-name="P7">коды ошибок;</text:p>
        </text:list-item>
        <text:list-item>
          <text:p text:style-name="P7">метод и <text:span text:style-name="T5">URL</text:span>.</text:p>
        </text:list-item>
      </text:list>
      <text:list text:continue-list="list2659576459" text:style-name="Numbering_20_123">
        <text:list-item>
          <text:p text:style-name="P8"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H10M10S</meta:editing-duration>
    <meta:editing-cycles>13</meta:editing-cycles>
    <meta:generator>LibreOffice/26.2.1.2$Windows_X86_64 LibreOffice_project/620$Build-2</meta:generator>
    <dc:title>my_default</dc:title>
    <dc:date>2026-04-18T06:22:22.480342100</dc:date>
    <meta:document-statistic meta:table-count="0" meta:image-count="0" meta:object-count="0" meta:page-count="1" meta:paragraph-count="11" meta:word-count="56" meta:character-count="388" meta:non-whitespace-character-count="348"/>
    <meta:template xlink:type="simple" xlink:actuate="onRequest" xlink:title="my_default" xlink:href="../../../AppData/Roaming/LibreOffice/4/user/template/my_default.ott" meta:date="2025-09-06T06:01:25.350303800"/>
  </office:meta>
</office:document-meta>
</file>