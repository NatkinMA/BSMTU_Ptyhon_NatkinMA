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94abe" officeooo:paragraph-rsid="00194abe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paragraph-rsid="00154991"/>
    </style:style>
    <style:style style:name="P5" style:family="paragraph" style:parent-style-name="Первая_20_строка_20_с_20_отступом_20__28_нумерованный_29_">
      <style:text-properties fo:language="ru" fo:country="RU" officeooo:rsid="0021bbb4" officeooo:paragraph-rsid="00249402"/>
    </style:style>
    <style:style style:name="P6" style:family="paragraph" style:parent-style-name="Первая_20_строка_20_с_20_отступом_20__28_маркированный_29_">
      <style:text-properties fo:language="en" fo:country="US" officeooo:rsid="00249402" officeooo:paragraph-rsid="00249402"/>
    </style:style>
    <style:style style:name="P7" style:family="paragraph" style:parent-style-name="Первая_20_строка_20_с_20_отступом_20__28_маркированный_29_">
      <style:text-properties fo:language="ru" fo:country="RU" officeooo:rsid="0026d181" officeooo:paragraph-rsid="0026d181"/>
    </style:style>
    <style:style style:name="P8" style:family="paragraph" style:parent-style-name="Первая_20_строка_20_с_20_отступом_20__28_нумерованный_29_">
      <style:text-properties fo:language="ru" fo:country="RU" officeooo:rsid="00150224" officeooo:paragraph-rsid="00150224"/>
    </style:style>
    <style:style style:name="P9" style:family="paragraph" style:parent-style-name="Heading_20_2">
      <style:text-properties fo:language="ru" fo:country="RU" officeooo:rsid="0026d181" officeooo:paragraph-rsid="0026d181"/>
    </style:style>
    <style:style style:name="P10" style:family="paragraph" style:parent-style-name="Первая_20_строка_20_с_20_отступом_20__28_нумерованный_29_">
      <style:text-properties officeooo:rsid="0026d181" officeooo:paragraph-rsid="0026d181"/>
    </style:style>
    <style:style style:name="P11" style:family="paragraph" style:parent-style-name="Листинг">
      <style:text-properties officeooo:paragraph-rsid="00279e30"/>
    </style:style>
    <style:style style:name="P12" style:family="paragraph" style:parent-style-name="Первая_20_строка_20_с_20_отступом_20__28_нумерованный_29_">
      <style:text-properties fo:language="ru" fo:country="RU" officeooo:rsid="00279e30" officeooo:paragraph-rsid="00279e30"/>
    </style:style>
    <style:style style:name="P13" style:family="paragraph" style:parent-style-name="Листинг">
      <style:text-properties fo:language="en" fo:country="US" officeooo:rsid="00279e30" officeooo:paragraph-rsid="00279e30"/>
    </style:style>
    <style:style style:name="P14" style:family="paragraph" style:parent-style-name="Первая_20_строка_20_с_20_отступом_20__28_нумерованный_29_">
      <style:text-properties fo:language="ru" fo:country="RU" officeooo:rsid="00283678" officeooo:paragraph-rsid="00283678"/>
    </style:style>
    <style:style style:name="P15" style:family="paragraph" style:parent-style-name="Листинг">
      <style:text-properties officeooo:paragraph-rsid="00283678"/>
    </style:style>
    <style:style style:name="T1" style:family="text">
      <style:text-properties fo:language="en" fo:country="US" officeooo:rsid="00194abe"/>
    </style:style>
    <style:style style:name="T2" style:family="text">
      <style:text-properties fo:language="ru" fo:country="RU" officeooo:rsid="0026d181"/>
    </style:style>
    <style:style style:name="T3" style:family="text">
      <style:text-properties officeooo:rsid="0026d181"/>
    </style:style>
    <style:style style:name="T4" style:family="text">
      <style:text-properties fo:language="en" fo:country="US" officeooo:rsid="0026d181"/>
    </style:style>
    <style:style style:name="T5" style:family="text">
      <style:text-properties fo:language="en" fo:country="US"/>
    </style:style>
    <style:style style:name="T6" style:family="text">
      <style:text-properties officeooo:rsid="00148a91"/>
    </style:style>
    <style:style style:name="T7" style:family="text">
      <style:text-properties fo:language="ru" fo:country="RU" officeooo:rsid="00148a91"/>
    </style:style>
    <style:style style:name="T8" style:family="text">
      <style:text-properties fo:language="en" fo:country="US" officeooo:rsid="00249402"/>
    </style:style>
    <style:style style:name="T9" style:family="text">
      <style:text-properties fo:language="ru" fo:country="RU" officeooo:rsid="00249402"/>
    </style:style>
    <style:style style:name="T10" style:family="text">
      <style:text-properties fo:language="ru" fo:country="RU" officeooo:rsid="00194abe"/>
    </style:style>
    <style:style style:name="T11" style:family="text">
      <style:text-properties officeooo:rsid="00249402"/>
    </style:style>
    <style:style style:name="T12" style:family="text">
      <style:text-properties fo:language="ru" fo:country="RU"/>
    </style:style>
    <style:style style:name="T13" style:family="text">
      <style:text-properties officeooo:rsid="00279e30"/>
    </style:style>
    <style:style style:name="T14" style:family="text">
      <style:text-properties officeooo:rsid="002c5ae9"/>
    </style:style>
    <style:style style:name="T15" style:family="text">
      <style:text-properties officeooo:rsid="002836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 <text:span text:style-name="T1">1</text:span><text:span text:style-name="T2">7</text:span></text:p>
      <text:h text:style-name="P2" text:outline-level="1"><text:span text:style-name="T3">Базовое администрирование</text:span><text:span text:style-name="T4"> Linux</text:span><text:span text:style-name="T3"> с использованием</text:span> <text:span text:style-name="T5">Python</text:span></text:h>
      <text:h text:style-name="P3" text:outline-level="2">Цель работы</text:h>
      <text:p text:style-name="P4"><text:span text:style-name="T6">Дать студентам практический навык</text:span><text:span text:style-name="T7"> </text:span><text:span text:style-name="T8">п</text:span><text:span text:style-name="T9">рименения</text:span><text:span text:style-name="T10"> языка программирования </text:span><text:span text:style-name="T1">Python </text:span><text:span text:style-name="T10">для </text:span><text:span text:style-name="T2">администрирования операционной системы </text:span><text:span text:style-name="T4">Linux</text:span><text:span text:style-name="T10">.</text:span></text:p>
      <text:h text:style-name="P3" text:outline-level="2">Постановка задачи</text:h>
      <text:list xml:id="list2113066176" text:style-name="Numbering_20_123">
        <text:list-item>
          <text:p text:style-name="P5"><text:span text:style-name="T11">Написать программ</text:span><text:span text:style-name="T3">ы</text:span><text:span text:style-name="T11"> на языке программирования </text:span><text:span text:style-name="T8">Python, </text:span><text:span text:style-name="T11">котор</text:span><text:span text:style-name="T3">ые</text:span><text:span text:style-name="T11">:</text:span></text:p>
        </text:list-item>
      </text:list>
      <text:list xml:id="list3334505656" text:style-name="List_20_2">
        <text:list-item>
          <text:p text:style-name="P6"><text:span text:style-name="T2">создают и удаляют пользователей</text:span><text:span text:style-name="T12">;</text:span></text:p>
        </text:list-item>
        <text:list-item>
          <text:p text:style-name="P7">копируют и удаляют файлы;</text:p>
        </text:list-item>
        <text:list-item>
          <text:p text:style-name="P7">выводят данные о загрузке процессора, оперативной памяти и диска,<text:line-break/>а также список запущенных процессов;</text:p>
        </text:list-item>
        <text:list-item>
          <text:p text:style-name="P7">запускают выполнение задачи по расписанию;</text:p>
        </text:list-item>
        <text:list-item>
          <text:p text:style-name="P7">выполняют резервную копию данных и изменяют права доступа.</text:p>
        </text:list-item>
      </text:list>
      <text:list xml:id="list112247207473577" text:continue-list="list2113066176" text:style-name="Numbering_20_123">
        <text:list-item>
          <text:p text:style-name="P8">Оформить отчет.</text:p>
        </text:list-item>
      </text:list>
      <text:h text:style-name="P9" text:outline-level="2">Содержание работы</text:h>
      <text:list xml:id="list112247585164202" text:continue-numbering="true" text:style-name="Numbering_20_123">
        <text:list-item text:start-value="1">
          <text:p text:style-name="P10">Установка библиотек, необходимых для администрирования операционной системы <text:span text:style-name="T5">Linux:</text:span></text:p>
        </text:list-item>
      </text:list>
      <text:list text:continue-list="list3334505656" text:style-name="List_20_2">
        <text:list-item>
          <text:p text:style-name="Первая_20_строка_20_с_20_отступом_20__28_маркированный_29_">psutil <text:span text:style-name="T13">– </text:span>показывает загрузку процессора (CPU), памяти и диска;</text:p>
        </text:list-item>
        <text:list-item>
          <text:p text:style-name="Первая_20_строка_20_с_20_отступом_20__28_маркированный_29_">paramiko <text:span text:style-name="T13">–</text:span> позволяет подключаться к другим устройствам по SSH (безопасный удалённый доступ) и выполнять команды;</text:p>
        </text:list-item>
        <text:list-item>
          <text:p text:style-name="Первая_20_строка_20_с_20_отступом_20__28_маркированный_29_">schedule <text:span text:style-name="T13">– </text:span>запускает процессы по расписанию автоматически, без ручного запуска.</text:p>
        </text:list-item>
      </text:list>
      <text:p text:style-name="P11"><text:span text:style-name="Source_20_Text">pip3 install psutil paramiko schedule</text:span></text:p>
      <text:list text:continue-list="list112247585164202" text:style-name="Numbering_20_123">
        <text:list-item>
          <text:p text:style-name="P12">Примеры программ, создающих и удаляющих пользователей:</text:p>
          <text:list>
            <text:list-item>
              <text:p text:style-name="P12">Создание пользователя:</text:p>
            </text:list-item>
          </text:list>
        </text:list-item>
      </text:list>
      <text:p text:style-name="Листинг"><text:bookmark-start text:name="__DdeLink__284_3573937858"/>import subprocess</text:p>
      <text:p text:style-name="Листинг"/>
      <text:p text:style-name="Листинг">def add_user(username):</text:p>
      <text:p text:style-name="Листинг"><text:soft-page-break/><text:s text:c="4"/>subprocess.run(['sudo', 'useradd', username])</text:p>
      <text:p text:style-name="Листинг"><text:s text:c="4"/>print(f"Пользователь {username} добавлен.")</text:p>
      <text:p text:style-name="Листинг"/>
      <text:p text:style-name="P13">add_user('noviy_user')<text:bookmark-end text:name="__DdeLink__284_3573937858"/></text:p>
      <text:list text:continue-numbering="true" text:style-name="Numbering_20_123">
        <text:list-item>
          <text:list>
            <text:list-item>
              <text:p text:style-name="P12">Удаление пользователя:</text:p>
            </text:list-item>
          </text:list>
        </text:list-item>
      </text:list>
      <text:p text:style-name="Листинг"><text:bookmark-start text:name="__DdeLink__286_3573937858"/>import subprocess</text:p>
      <text:p text:style-name="Листинг"/>
      <text:p text:style-name="Листинг">def remove_user(username):</text:p>
      <text:p text:style-name="Листинг"/>
      <text:p text:style-name="Листинг"><text:s text:c="4"/>subprocess.run(['sudo', 'userdel', username])</text:p>
      <text:p text:style-name="Листинг"><text:s text:c="4"/>print(f"Пользователь {username} удален.")</text:p>
      <text:p text:style-name="Листинг"/>
      <text:p text:style-name="Листинг">remove_user('noviy_user')<text:bookmark-end text:name="__DdeLink__286_3573937858"/></text:p>
      <text:list text:continue-numbering="true" text:style-name="Numbering_20_123">
        <text:list-item>
          <text:p text:style-name="P12">Примеры программ для копирования и удаления файлов:</text:p>
          <text:list>
            <text:list-item>
              <text:p text:style-name="P12">Копирование файлов:</text:p>
            </text:list-item>
          </text:list>
        </text:list-item>
      </text:list>
      <text:p text:style-name="Листинг"><text:bookmark-start text:name="__DdeLink__291_3573937858"/>import shutil</text:p>
      <text:p text:style-name="Листинг"/>
      <text:p text:style-name="Листинг">def copy_file(src, dst):</text:p>
      <text:p text:style-name="Листинг"><text:s text:c="4"/>shutil.copy(src, dst)</text:p>
      <text:p text:style-name="Листинг"><text:s text:c="4"/>print(f"Файл {src} скопирован в {dst}")</text:p>
      <text:p text:style-name="Листинг"/>
      <text:p text:style-name="Листинг">copy_file('source.txt', 'destination.txt') <text:s/># замените на свои файлы<text:bookmark-end text:name="__DdeLink__291_3573937858"/></text:p>
      <text:list text:continue-numbering="true" text:style-name="Numbering_20_123">
        <text:list-item>
          <text:list>
            <text:list-item>
              <text:p text:style-name="P12">Удаление файлов:</text:p>
            </text:list-item>
          </text:list>
        </text:list-item>
      </text:list>
      <text:p text:style-name="Листинг"><text:bookmark-start text:name="__DdeLink__577_3573937858"/>import os</text:p>
      <text:p text:style-name="Листинг"/>
      <text:p text:style-name="Листинг">def delete_file(filename):</text:p>
      <text:p text:style-name="Листинг"><text:s text:c="4"/>os.remove(filename)</text:p>
      <text:p text:style-name="Листинг"><text:s text:c="4"/>print(f"Файл {filename} удален.")</text:p>
      <text:p text:style-name="Листинг"/>
      <text:p text:style-name="Листинг">delete_file('destination.txt') <text:s/><text:span text:style-name="T14">#</text:span> замените на имя файла.<text:bookmark-end text:name="__DdeLink__577_3573937858"/></text:p>
      <text:list text:continue-numbering="true" text:style-name="Numbering_20_123">
        <text:list-item>
          <text:p text:style-name="P12">Примеры программ, выводящих данные о загрузке процессора, оперативной памяти и диска, а также список запущенных процессов:</text:p>
          <text:list>
            <text:list-item>
              <text:p text:style-name="P12">Вывод данных о загрузке процессора, оперативной памяти и диска:</text:p>
            </text:list-item>
          </text:list>
        </text:list-item>
      </text:list>
      <text:p text:style-name="Листинг"><text:bookmark-start text:name="__DdeLink__582_3573937858"/>import psutil</text:p>
      <text:p text:style-name="Листинг"><text:soft-page-break/>import time</text:p>
      <text:p text:style-name="Листинг">def monitor_resources():</text:p>
      <text:p text:style-name="Листинг"><text:s text:c="4"/>while True:</text:p>
      <text:p text:style-name="Листинг"><text:s text:c="6"/>cpu_percent = psutil.cpu_percent(interval=1)</text:p>
      <text:p text:style-name="Листинг"><text:s text:c="6"/>mem = psutil.virtual_memory()</text:p>
      <text:p text:style-name="Листинг"><text:s text:c="6"/>disk = psutil.disk_usage('/')</text:p>
      <text:p text:style-name="Листинг"><text:s text:c="6"/></text:p>
      <text:p text:style-name="Листинг"><text:s text:c="6"/>print(f"CPU загружен на: {cpu_percent}%")</text:p>
      <text:p text:style-name="Листинг"><text:s text:c="6"/>print(f"Памяти использовано: {mem.percent}%")</text:p>
      <text:p text:style-name="Листинг"><text:s text:c="6"/>print(f"Диск заполнен на: {disk.percent}%")</text:p>
      <text:p text:style-name="Листинг"><text:s text:c="6"/>print("-----------------------------")</text:p>
      <text:p text:style-name="Листинг"><text:s text:c="6"/></text:p>
      <text:p text:style-name="Листинг"><text:s text:c="6"/>time.sleep(5) <text:s/># Пауза 5 секунд перед следующим замером</text:p>
      <text:p text:style-name="Листинг">if __name__ == "__main__":</text:p>
      <text:p text:style-name="Листинг"><text:s text:c="4"/>monitor_resources()<text:bookmark-end text:name="__DdeLink__582_3573937858"/></text:p>
      <text:list text:continue-numbering="true" text:style-name="Numbering_20_123">
        <text:list-item>
          <text:list>
            <text:list-item>
              <text:p text:style-name="P12">Вывод списка запущенных процессов:</text:p>
            </text:list-item>
          </text:list>
        </text:list-item>
      </text:list>
      <text:p text:style-name="Листинг"><text:bookmark-start text:name="__DdeLink__584_3573937858"/>import psutil</text:p>
      <text:p text:style-name="Листинг"/>
      <text:p text:style-name="Листинг">def list_processes():</text:p>
      <text:p text:style-name="Листинг"><text:s text:c="4"/>for proc in psutil.process_iter(['pid', 'name']):</text:p>
      <text:p text:style-name="P11"><text:s text:c="8"/>print(f"PID: {proc.info['pid']},</text:p>
      <text:p text:style-name="P11"><text:s text:c="14"/>Имя: {proc.info['name']}")</text:p>
      <text:p text:style-name="Листинг"/>
      <text:p text:style-name="Листинг">list_processes()<text:bookmark-end text:name="__DdeLink__584_3573937858"/></text:p>
      <text:list text:continue-numbering="true" text:style-name="Numbering_20_123">
        <text:list-item>
          <text:p text:style-name="P12">Пример программы, запускающей выполнение задачи по расписанию:</text:p>
        </text:list-item>
      </text:list>
      <text:p text:style-name="Листинг">import schedule</text:p>
      <text:p text:style-name="Листинг">import time</text:p>
      <text:p text:style-name="Листинг"/>
      <text:p text:style-name="Листинг">def job():</text:p>
      <text:p text:style-name="Листинг"><text:s text:c="4"/>print("Задача выполнена!")</text:p>
      <text:p text:style-name="Листинг"/>
      <text:p text:style-name="Листинг">(Запуск задачи каждый день в 3:00)</text:p>
      <text:p text:style-name="Листинг">schedule.every().day.at("03:00").do(job)</text:p>
      <text:p text:style-name="Листинг"/>
      <text:p text:style-name="Листинг">while True:</text:p>
      <text:p text:style-name="Листинг"><text:s text:c="4"/>schedule.run_pending()</text:p>
      <text:p text:style-name="Листинг"><text:soft-page-break/><text:s text:c="4"/>time.sleep(60)</text:p>
      <text:list text:continue-numbering="true" text:style-name="Numbering_20_123">
        <text:list-item>
          <text:p text:style-name="P12"><text:span text:style-name="T15">Пример программ, </text:span>выполняю<text:span text:style-name="T15">щих</text:span> резервную копию данных и изменяю<text:span text:style-name="T15">щих</text:span> права доступа:</text:p>
          <text:list>
            <text:list-item>
              <text:p text:style-name="P14">Выполнение резервной копии данных:</text:p>
            </text:list-item>
          </text:list>
        </text:list-item>
      </text:list>
      <text:p text:style-name="Листинг">import shutil</text:p>
      <text:p text:style-name="Листинг"/>
      <text:p text:style-name="P15">shutil.copytree('/home/user/data', </text:p>
      <text:p text:style-name="P15"><text:s text:c="16"/>'/home/user/backup/data')</text:p>
      <text:p text:style-name="Листинг">print("Копирование завершено")</text:p>
      <text:list text:continue-numbering="true" text:style-name="Numbering_20_123">
        <text:list-item>
          <text:list>
            <text:list-item>
              <text:p text:style-name="P14">Назначение прав доступа:</text:p>
            </text:list-item>
          </text:list>
        </text:list-item>
      </text:list>
      <text:p text:style-name="Листинг">import os</text:p>
      <text:p text:style-name="Листинг"/>
      <text:p text:style-name="Листинг">os.chmod('file.txt', 0o755)</text:p>
      <text:p text:style-name="Листинг">print("Права доступа изменены"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Листинг" style:family="paragraph" style:parent-style-name="Standard" style:master-page-name="">
      <style:paragraph-properties fo:margin-left="1.251cm" fo:margin-top="0cm" fo:margin-bottom="0.21cm" style:contextual-spacing="false" style:page-number="auto" fo:padding="0.049cm" fo:border-left="none" fo:border-right="none" fo:border-top="0.06pt solid #000000" fo:border-bottom="0.51pt solid #000000"/>
      <style:text-properties style:font-name="Liberation Mono1" fo:font-family="'Liberation Mono'" style:font-style-name="Обычный" style:font-family-generic="modern" style:font-pitch="fixed" fo:font-size="12pt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4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6T06:01:26.391414900</meta:creation-date>
    <meta:editing-duration>PT2H13M44S</meta:editing-duration>
    <meta:editing-cycles>18</meta:editing-cycles>
    <meta:generator>LibreOffice/25.8.3.2$Linux_X86_64 LibreOffice_project/580$Build-2</meta:generator>
    <dc:title>my_default</dc:title>
    <dc:date>2026-04-18T11:22:45.516586878</dc:date>
    <meta:document-statistic meta:table-count="0" meta:image-count="0" meta:object-count="0" meta:page-count="4" meta:paragraph-count="90" meta:word-count="360" meta:character-count="3318" meta:non-whitespace-character-count="2910"/>
    <meta:template xlink:type="simple" xlink:actuate="onRequest" xlink:title="my_default" xlink:href="../../../AppData/Roaming/LibreOffice/4/user/template/my_default.ott" meta:date="2025-09-06T06:01:25.350303800"/>
  </office:meta>
</office:document-meta>
</file>